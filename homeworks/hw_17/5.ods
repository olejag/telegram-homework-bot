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/>
      <table:table table:name="Лист 1" table:style-name="ta1">
        <table:table-column table:style-name="co1" table:number-columns-repeated="3" table:default-cell-style-name="ce6"/>
        <table:table-column table:style-name="co2" table:number-columns-repeated="16381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;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;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;24;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;6;1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;17;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;19;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;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;2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;1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;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;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;1;1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;6;1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;1;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3" table:number-rows-repeated="104854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 style:data-style-name="N2" text:time-value="11:39:33.312643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>Denis M. Ushakov</meta:initial-creator>
    <meta:creation-date>2025-07-12T17:37:41Z</meta:creation-date>
    <dc:date>2026-02-26T11:39:57.165533500</dc:date>
    <meta:editing-duration>PT2M29S</meta:editing-duration>
    <meta:editing-cycles>2</meta:editing-cycles>
    <meta:document-statistic meta:table-count="1" meta:cell-count="78" meta:object-count="0"/>
  </office:meta>
</office:document-meta>
</file>