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75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68" calcext:value-type="float">
            <text:p>6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3" calcext:value-type="float">
            <text:p>23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8" calcext:value-type="float">
            <text:p>18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7" calcext:value-type="float">
            <text:p>67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3" calcext:value-type="float">
            <text:p>63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4" calcext:value-type="float">
            <text:p>64</text:p>
          </table:table-cell>
          <table:table-cell table:style-name="ce3" office:value-type="float" office:value="75" calcext:value-type="float">
            <text:p>75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8" calcext:value-type="float">
            <text:p>48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 table:style-name="ce5" office:value-type="float" office:value="71" calcext:value-type="float">
            <text:p>7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7" calcext:value-type="float">
            <text:p>87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0" calcext:value-type="float">
            <text:p>80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 table:style-name="ce5" office:value-type="float" office:value="84" calcext:value-type="float">
            <text:p>8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6" calcext:value-type="float">
            <text:p>7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4" calcext:value-type="float">
            <text:p>84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7" calcext:value-type="float">
            <text:p>47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3" calcext:value-type="float">
            <text:p>83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7" calcext:value-type="float">
            <text:p>87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5" office:value-type="float" office:value="32" calcext:value-type="float">
            <text:p>3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3" calcext:value-type="float">
            <text:p>1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 table:style-name="ce5" office:value-type="float" office:value="48" calcext:value-type="float">
            <text:p>4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" calcext:value-type="float">
            <text:p>7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5" office:value-type="float" office:value="43" calcext:value-type="float">
            <text:p>43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9" calcext:value-type="float">
            <text:p>89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5" office:value-type="float" office:value="89" calcext:value-type="float">
            <text:p>89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 table:style-name="ce5" office:value-type="float" office:value="31" calcext:value-type="float">
            <text:p>3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4" calcext:value-type="float">
            <text:p>14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5" office:value-type="float" office:value="81" calcext:value-type="float">
            <text:p>81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5" calcext:value-type="float">
            <text:p>35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5" office:value-type="float" office:value="84" calcext:value-type="float">
            <text:p>84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6" calcext:value-type="float">
            <text:p>26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7" calcext:value-type="float">
            <text:p>77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7" calcext:value-type="float">
            <text:p>77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 office:value-type="float" office:value="56" calcext:value-type="float">
            <text:p>56</text:p>
          </table:table-cell>
          <table:table-cell table:style-name="ce4" office:value-type="float" office:value="78" calcext:value-type="float">
            <text:p>7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6" calcext:value-type="float">
            <text:p>76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5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9" calcext:value-type="float">
            <text:p>19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1" calcext:value-type="float">
            <text:p>51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9" calcext:value-type="float">
            <text:p>19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3" table:number-columns-repeated="25"/>
          <table:table-cell table:style-name="ce5"/>
          <table:table-cell table:number-columns-repeated="16358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SUS</meta:initial-creator>
    <meta:creation-date>2026-01-15T09:57:51Z</meta:creation-date>
    <dc:date>2026-01-15T13:05:50.938000000</dc:date>
    <meta:editing-duration>PT8S</meta:editing-duration>
    <meta:editing-cycles>1</meta:editing-cycles>
    <meta:document-statistic meta:table-count="1" meta:cell-count="625" meta:object-count="0"/>
  </office:meta>
</office:document-meta>
</file>