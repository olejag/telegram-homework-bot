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1428571428571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16384" table:default-cell-style-name="ce1"/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number-rows-repeated="10449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Сергей Шашков</meta:initial-creator>
    <dc:creator>Сергей Шашков</dc:creator>
    <meta:creation-date>2024-04-11T06:52:15Z</meta:creation-date>
    <dc:date>2024-04-11T06:52:15Z</dc:date>
  </office:meta>
</office:document-meta>
</file>